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aff6" officeooo:paragraph-rsid="0009aff6"/>
    </style:style>
    <style:style style:name="T1" style:family="text">
      <style:text-properties officeooo:rsid="000b3842"/>
    </style:style>
    <style:style style:name="T2" style:family="text">
      <style:text-properties officeooo:rsid="000bfee1"/>
    </style:style>
    <style:style style:name="T3" style:family="text">
      <style:text-properties officeooo:rsid="000cf1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ffmpeg works frame 100 from the 720p version attached</text:p>
      <text:p text:style-name="P1"/>
      <text:p text:style-name="P1">2. the Sobel filter works by taking an image, blurring it to reduce the amount of large differences between objects and reducing the amount of edges there will be to detect. Then it gray scales the image and calculates the gradient of the pixel intensity which is gray scale is just the value. It does this with kernels for the x and y direction at this link <text:a xlink:type="simple" xlink:href="https://learnopencv.com/edge-detection-using-opencv/#sobel-edge" text:style-name="Internet_20_link" text:visited-style-name="Visited_20_Internet_20_Link">https://learnopencv.com/edge-detection-using-opencv/#sobel-edge</text:a></text:p>
      <text:p text:style-name="P1">the resultinf 2 direction gradient is combined by finding the magnitude of the gradient with the formula at the link above. Playing with the <text:span text:style-name="T1">parameters the resultsi think saw the best edges although crowded due to the image being of trees with leaves, was with a ksize of 1, </text:span><text:span text:style-name="T3">increase with K key once, </text:span><text:span text:style-name="T1">and scale of </text:span><text:span text:style-name="T2">3,</text:span><text:span text:style-name="T1"> </text:span><text:span text:style-name="T3">increased with S key twice, </text:span><text:span text:style-name="T1">which began to show the cloud as well and clearly had the outline of the treeline along with a lot of the leaves on the trees. </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21:31:53.532285760</meta:creation-date>
    <dc:date>2026-06-16T21:51:26.653775797</dc:date>
    <meta:editing-duration>PT9M21S</meta:editing-duration>
    <meta:editing-cycles>3</meta:editing-cycles>
    <meta:generator>LibreOffice/7.3.7.2$Linux_AARCH64 LibreOffice_project/30$Build-2</meta:generator>
    <meta:document-statistic meta:table-count="0" meta:image-count="0" meta:object-count="0" meta:page-count="1" meta:paragraph-count="3" meta:word-count="167" meta:character-count="950" meta:non-whitespace-character-count="785"/>
  </office:meta>
</office:document-meta>
</file>