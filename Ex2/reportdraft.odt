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aff6" officeooo:paragraph-rsid="0009aff6"/>
    </style:style>
    <style:style style:name="P2" style:family="paragraph" style:parent-style-name="Standard">
      <style:text-properties officeooo:rsid="0009aff6" officeooo:paragraph-rsid="0009aff6"/>
    </style:style>
    <style:style style:name="P3" style:family="paragraph" style:parent-style-name="Standard">
      <style:text-properties officeooo:rsid="000e9639" officeooo:paragraph-rsid="000e9639"/>
    </style:style>
    <style:style style:name="P4" style:family="paragraph" style:parent-style-name="Standard">
      <style:text-properties officeooo:rsid="000e9639" officeooo:paragraph-rsid="000eb1b8"/>
    </style:style>
    <style:style style:name="P5" style:family="paragraph" style:parent-style-name="Standard">
      <style:text-properties officeooo:rsid="000eb1b8" officeooo:paragraph-rsid="000eb1b8"/>
    </style:style>
    <style:style style:name="P6" style:family="paragraph" style:parent-style-name="Standard">
      <style:text-properties officeooo:rsid="001120cd" officeooo:paragraph-rsid="001120cd"/>
    </style:style>
    <style:style style:name="P7" style:family="paragraph" style:parent-style-name="Standard">
      <style:text-properties officeooo:rsid="001314c3" officeooo:paragraph-rsid="001314c3"/>
    </style:style>
    <style:style style:name="T1" style:family="text">
      <style:text-properties officeooo:rsid="000b3842"/>
    </style:style>
    <style:style style:name="T2" style:family="text">
      <style:text-properties officeooo:rsid="000bfee1"/>
    </style:style>
    <style:style style:name="T3" style:family="text">
      <style:text-properties officeooo:rsid="000cf104"/>
    </style:style>
    <style:style style:name="T4" style:family="text">
      <style:text-properties officeooo:rsid="000eb1b8"/>
    </style:style>
    <style:style style:name="T5" style:family="text">
      <style:text-properties officeooo:rsid="001314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ffmpeg works frame 100 from the 720p version attached</text:p>
      <text:p text:style-name="P1"/>
      <text:p text:style-name="P1">2. the Sobel filter works by taking an image, blurring it to reduce the amount of large differences between objects and reducing the amount of edges there will be to detect. Then it gray scales the image and calculates the gradient of the pixel intensity which is gray scale is just the value. It does this with kernels for the x and y direction at this link <text:a xlink:type="simple" xlink:href="https://learnopencv.com/edge-detection-using-opencv/#sobel-edge" text:style-name="Internet_20_link" text:visited-style-name="Visited_20_Internet_20_Link">https://learnopencv.com/edge-detection-using-opencv/#sobel-edge</text:a></text:p>
      <text:p text:style-name="P1">the resultinf 2 direction gradient is combined by finding the magnitude of the gradient with the formula at the link above. Playing with the <text:span text:style-name="T1">parameters the resultsi think saw the best edges although crowded due to the image being of trees with leaves, was with a ksize of 1, </text:span><text:span text:style-name="T3">increase with K key once, </text:span><text:span text:style-name="T1">and scale of </text:span><text:span text:style-name="T2">3,</text:span><text:span text:style-name="T1"> </text:span><text:span text:style-name="T3">increased with S key twice, </text:span><text:span text:style-name="T1">which began to show the cloud as well and clearly had the outline of the treeline along with a lot of the leaves on the trees. </text:span></text:p>
      <text:p text:style-name="P1"/>
      <text:p text:style-name="P3">3. FFMPEG for frame 200 only attached and frame 200</text:p>
      <text:p text:style-name="P3"/>
      <text:p text:style-name="P4">Canny edge detection works is very similar to sobel in that first the image is converted to grayscale, <text:span text:style-name="T4">and blurred to reduce the noise in the image. Then gradient is calculated the same way as Sobel. But then canny edge uses a suppression to fid the maximum value in an area which focus the edges from a few pixels in width to a more narrow and ideally 1 pixel wide. Then once that is complete, a hysteresis is completed which identifies strong and weak pixel edges through threshold values. If the value of a pixel is above both thresholds then it is deemed strong and the value is 255. If the value is between then it is weak and if it is below then it is set to zero. Finally to decide if the weak pixel become strong or zero, each weak pixel is analyzed with its neighbors. If one of the neighbors are strong then the weak pixel is upgraded to strong. If there are no strong pixels surrounding then the value is set to zero. The threshold values are adjustable by the user to determine how faint of edges want to be suppressed. </text:span></text:p>
      <text:p text:style-name="P5">Final canny image. </text:p>
      <text:p text:style-name="P5"/>
      <text:p text:style-name="P6">4. The Capture.c code is much lower level and does all the things that OpenCV’s libraries do to open the camera, store the image to a buffer <text:span text:style-name="T5">and then the disk, convert from the cameras YUV to RGB, and reading the camera data from the IO. This doesn’t however display the image. All the low level coding takes almost 1000 lines to complete what capture.cpp does in less that 50. The capture.cpp creates a window, sets the image size, and then reads the image from the camera and displays to the window. This also has a 10 mi pause waiting for input from the user to end capture.cpp.</text:span></text:p>
      <text:p text:style-name="P6"/>
      <text:p text:style-name="P7">Get screenshot for each image code </text:p>
      <text:p text:style-name="P7"/>
      <text:p text:style-name="P7">As someone not very experienced with low level coding, I much prefer the OpenCV approach due to the simplicity and ease of us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21:31:53.532285760</meta:creation-date>
    <dc:date>2026-06-19T15:37:57.057322154</dc:date>
    <meta:editing-duration>PT31M49S</meta:editing-duration>
    <meta:editing-cycles>5</meta:editing-cycles>
    <meta:generator>LibreOffice/7.3.7.2$Linux_AARCH64 LibreOffice_project/30$Build-2</meta:generator>
    <meta:document-statistic meta:table-count="0" meta:image-count="0" meta:object-count="0" meta:page-count="1" meta:paragraph-count="9" meta:word-count="512" meta:character-count="2796" meta:non-whitespace-character-count="2288"/>
  </office:meta>
</office:document-meta>
</file>